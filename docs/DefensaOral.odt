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automatic-styles>
    <style:style style:name="P1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fo:color="#14181f" loext:opacity="100%" style:font-name="var font-mono" fo:background-color="transparent" loext:char-shading-value="0"/>
    </style:style>
    <style:style style:name="T2" style:family="text">
      <style:text-properties fo:color="#355269" loext:opacity="100%" style:font-name="var font-mono" fo:background-color="transparent" loext:char-shading-value="0"/>
    </style:style>
    <style:style style:name="T3" style:family="text">
      <style:text-properties fo:color="#355269" loext:opacity="100%" style:font-name="var font-mono" fo:font-weight="bold" fo:background-color="transparent" loext:char-shading-value="0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mpezamos por el guion. Son 15 minutos, así que lo estructuro con tiempos:</text:p>
      <text:p text:style-name="Horizontal_20_Line"/>
      <text:p text:style-name="Text_20_body"><text:span text:style-name="Strong_20_Emphasis">[0:00 – 1:00] Introducción</text:span> "El proyecto consiste en un clasificador de estado de salud mediante Machine Learning. El objetivo es predecir si un paciente tiene riesgo de diabetes a partir de 8 indicadores biomédicos, usando el dataset Pima Indians Diabetes con 768 pacientes."</text:p>
      <text:p text:style-name="Text_20_body"><text:span text:style-name="Strong_20_Emphasis">[1:00 – 2:30] Dataset y problema</text:span> "El dataset tiene 9 columnas: 8 variables predictoras como glucosa, IMC o edad, y una variable objetivo binaria: 0 sin diabetes, 1 con diabetes. El 65% de los pacientes no tiene diabetes y el 35% sí, lo que implica un ligero desbalance de clases que hemos tenido en cuenta."</text:p>
      <text:p text:style-name="Text_20_body"><text:span text:style-name="Strong_20_Emphasis">[2:30 – 5:00] Demostración en vivo — ejecutar el script</text:span></text:p>
      <text:p text:style-name="P1"><text:span text:style-name="Source_20_Text"><text:span text:style-name="T1"><text:tab/></text:span></text:span><text:span text:style-name="Source_20_Text"><text:span text:style-name="T3">python3 clasificador_salud.py</text:span></text:span></text:p>
      <text:p text:style-name="Text_20_body">Mientras se ejecuta, explicas en voz alta cada fase que aparece en consola: ingesta, preprocesamiento, EDA y modelado.</text:p>
      <text:p text:style-name="Text_20_body"><text:span text:style-name="Strong_20_Emphasis">[5:00 – 7:00] Preprocesamiento</text:span> "El dataset codifica los datos ausentes como ceros en variables donde un cero es imposible, por ejemplo glucosa igual a cero. Detectamos 361 valores de este tipo y los imputamos con la mediana de cada columna, que es más robusta que la media frente a valores extremos."</text:p>
      <text:p text:style-name="Text_20_body"><text:span text:style-name="Strong_20_Emphasis">[7:00 – 9:00] EDA — mostrar las gráficas</text:span> Abre las 4 imágenes de la carpeta <text:span text:style-name="Source_20_Text">graficas/</text:span> y comenta:</text:p>
      <text:list text:style-name="L1">
        <text:list-item>
          <text:p text:style-name="P3"><text:span text:style-name="Source_20_Text">01_distribuciones</text:span>: "Se aprecia que los pacientes con diabetes tienen niveles de glucosa e IMC más altos." </text:p>
        </text:list-item>
        <text:list-item>
          <text:p text:style-name="P3"><text:span text:style-name="Source_20_Text">02_dispersion</text:span>: "A mayor edad y glucosa, mayor concentración de casos positivos." </text:p>
        </text:list-item>
        <text:list-item>
          <text:p text:style-name="P2"><text:span text:style-name="Source_20_Text">03_correlacion</text:span>: "La glucosa es la variable más correlacionada con el diagnóstico, con un valor de 0.49." </text:p>
        </text:list-item>
      </text:list>
      <text:p text:style-name="Text_20_body"><text:span text:style-name="Strong_20_Emphasis">[9:00 – 12:00] Modelos y resultados</text:span> "Entrenamos dos modelos: un Árbol de Decisión con profundidad máxima 5 y un KNN con k=7. Dividimos los datos 80/20 manteniendo la proporción de clases. El mejor modelo es KNN con un 85% de accuracy en test y un 88% en validación cruzada de 5 pliegues."</text:p>
      <text:p text:style-name="Text_20_body"><text:span text:style-name="Strong_20_Emphasis">[12:00 – 13:30] Justificación de decisiones</text:span></text:p>
      <text:list text:style-name="L2">
        <text:list-item>
          <text:p text:style-name="P5">"Elegí la mediana para imputar porque es robusta frente a outliers, especialmente en la variable Insulina." </text:p>
        </text:list-item>
        <text:list-item>
          <text:p text:style-name="P5">"Usé stratify en la división para garantizar que ambas clases estén representadas en train y test." </text:p>
        </text:list-item>
        <text:list-item>
          <text:p text:style-name="P5">"Apliqué StandardScaler porque KNN es sensible a la escala de las variables al basarse en distancias." </text:p>
        </text:list-item>
        <text:list-item>
          <text:p text:style-name="P4">"max_depth=5 en el árbol evita el sobreajuste sin perder capacidad predictiva." </text:p>
        </text:list-item>
      </text:list>
      <text:p text:style-name="Text_20_body"><text:span text:style-name="Strong_20_Emphasis">[13:30 – 15:00] Conclusiones y GitHub</text:span> "El proyecto implementa el ciclo completo de ML. La glucosa es el predictor más relevante. Como mejora futura se podría aplicar SMOTE para balancear clases o explorar Random Forest." Muestra el repositorio en GitHub con los commi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6T11:54:04.018060953</meta:creation-date>
    <dc:date>2026-05-06T11:55:11.175569956</dc:date>
    <meta:editing-duration>PT1M8S</meta:editing-duration>
    <meta:editing-cycles>2</meta:editing-cycles>
    <meta:generator>LibreOffice/7.5.6.2$Linux_X86_64 LibreOffice_project/50$Build-2</meta:generator>
    <meta:document-statistic meta:table-count="0" meta:image-count="0" meta:object-count="0" meta:page-count="1" meta:paragraph-count="18" meta:word-count="410" meta:character-count="2545" meta:non-whitespace-character-count="2142"/>
  </office:meta>
</office:document-meta>
</file>