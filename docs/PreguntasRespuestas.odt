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P1" style:family="paragraph" style:parent-style-name="Preformatted_20_Text">
      <loext:graphic-properties draw:fill="none" draw:fill-color="#ffffff"/>
      <style:paragraph-properties fo:margin-top="0cm" fo:margin-bottom="0.499cm" style:contextual-spacing="false" fo:background-color="transparen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T1" style:family="text">
      <style:text-properties fo:color="#14181f" loext:opacity="100%" style:font-name="var font-mono" fo:background-color="transparent" loext:char-shading-value="0"/>
    </style:style>
    <style:style style:name="T2" style:family="text">
      <style:text-properties fo:color="#355269" loext:opacity="100%" style:font-name="var font-mono" fo:background-color="transparent" loext:char-shading-value="0"/>
    </style:style>
    <style:style style:name="T3" style:family="text">
      <style:text-properties fo:color="#355269" loext:opacity="100%" style:font-name="var font-mono" fo:font-weight="bold" fo:background-color="transparent" loext:char-shading-value="0"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van las preguntas más probables con sus respuestas:</text:p>
      <text:p text:style-name="Horizontal_20_Line"/>
      <text:p text:style-name="Text_20_body"><text:span text:style-name="Strong_20_Emphasis">SOBRE EL DATASET</text:span></text:p>
      <text:p text:style-name="Text_20_body"><text:span text:style-name="Strong_20_Emphasis">¿Por qué usaste este dataset y no otro?</text:span> "Es un dataset clásico y bien documentado para problemas de clasificación binaria en salud. Tiene un tamaño manejable, variables biomédicas reales y está ampliamente validado en la literatura."</text:p>
      <text:p text:style-name="Text_20_body"><text:span text:style-name="Strong_20_Emphasis">¿Por qué hay ceros en el dataset y cómo los trataste?</text:span> "El dataset codifica los datos ausentes como ceros en variables donde un cero es fisiológicamente imposible, como glucosa o presión arterial. Los reemplazamos por NaN y luego imputamos con la mediana de cada columna."</text:p>
      <text:p text:style-name="Text_20_body"><text:span text:style-name="Strong_20_Emphasis">¿Por qué la mediana y no la media?</text:span> "La mediana es robusta frente a valores extremos. En variables como Insulina hay outliers muy altos que distorsionarían la media, mientras que la mediana no se ve afectada."</text:p>
      <text:p text:style-name="Horizontal_20_Line"/>
      <text:p text:style-name="Text_20_body"><text:span text:style-name="Strong_20_Emphasis">SOBRE EL PREPROCESAMIENTO</text:span></text:p>
      <text:p text:style-name="Text_20_body"><text:span text:style-name="Strong_20_Emphasis">¿Qué es la normalización y por qué la aplicaste?</text:span> "StandardScaler transforma cada variable para que tenga media 0 y desviación estándar 1. Es imprescindible para KNN porque este algoritmo calcula distancias entre puntos, y si una variable tiene valores muy grandes dominaría el cálculo."</text:p>
      <text:p text:style-name="Text_20_body"><text:span text:style-name="Strong_20_Emphasis">¿Por qué ajustaste el scaler solo sobre el train y no sobre todo el dataset?</text:span> "Para evitar data leakage, es decir, que el modelo tenga información del conjunto de test durante el entrenamiento. Si escaláramos con todos los datos, estaríamos filtrando información del futuro al modelo."</text:p>
      <text:p text:style-name="Text_20_body"><text:span text:style-name="Strong_20_Emphasis">¿Qué es stratify y por qué lo usaste?</text:span> "Garantiza que la proporción de clases sea la misma en train y test. Sin stratify, podría ocurrir por azar que el test tuviera muchos más casos de una clase y los resultados no serían representativos."</text:p>
      <text:p text:style-name="Horizontal_20_Line"/>
      <text:p text:style-name="Text_20_body"><text:span text:style-name="Strong_20_Emphasis">SOBRE LOS MODELOS</text:span></text:p>
      <text:p text:style-name="Text_20_body"><text:span text:style-name="Strong_20_Emphasis">¿Por qué elegiste estos dos modelos y no otros?</text:span> "Son los algoritmos de clasificación más habituales para empezar: el árbol de decisión es muy interpretable y el KNN es simple pero efectivo con datos bien normalizados. Además son los que pide explícitamente el enunciado."</text:p>
      <text:p text:style-name="Text_20_body"><text:span text:style-name="Strong_20_Emphasis">¿Cómo funciona el Árbol de Decisión?</text:span> "Divide el espacio de características en regiones mediante preguntas binarias, por ejemplo glucosa mayor o menor que 127. Cada nodo hace una pregunta y las hojas asignan una clase. Es muy fácil de interpretar visualmente."</text:p>
      <text:p text:style-name="Text_20_body"><text:span text:style-name="Strong_20_Emphasis">¿Cómo funciona KNN?</text:span> "Para clasificar un paciente nuevo, busca los 7 vecinos más cercanos en el espacio de características y asigna la clase mayoritaria entre ellos. La distancia se calcula con la fórmula euclidiana."</text:p>
      <text:p text:style-name="Text_20_body"><text:span text:style-name="Strong_20_Emphasis">¿Por qué k=7 y no otro valor?</text:span> "Se eligió 7 porque es un número impar, lo que evita empates en la votación, y porque lo validamos mediante validación cruzada probando distintos valores de k."</text:p>
      <text:p text:style-name="Text_20_body"><text:span text:style-name="Strong_20_Emphasis">¿Qué es la validación cruzada de 5 pliegues?</text:span> "Divide el conjunto de entrenamiento en 5 partes iguales. En cada iteración usa 4 partes para entrenar y 1 para validar, rotando la parte de validación. <text:soft-page-break/>El resultado final es la media de las 5 iteraciones, lo que da una estimación más fiable que una única partición."</text:p>
      <text:p text:style-name="Horizontal_20_Line"/>
      <text:p text:style-name="Text_20_body"><text:span text:style-name="Strong_20_Emphasis">SOBRE LOS RESULTADOS</text:span></text:p>
      <text:p text:style-name="Text_20_body"><text:span text:style-name="Strong_20_Emphasis">¿Un 85% de accuracy es un buen resultado?</text:span> "Es un resultado sólido para un modelo de clasificación binaria con datos reales y sin técnicas avanzadas. En contexto clínico, sin embargo, el recall de la clase positiva sería más importante que el accuracy global, para minimizar los falsos negativos."</text:p>
      <text:p text:style-name="Text_20_body"><text:span text:style-name="Strong_20_Emphasis">¿Qué es un falso negativo en este contexto y por qué importa?</text:span> "Un falso negativo es predecir que un paciente no tiene diabetes cuando en realidad sí la tiene. En medicina es el error más peligroso porque el paciente no recibiría tratamiento."</text:p>
      <text:p text:style-name="Text_20_body"><text:span text:style-name="Strong_20_Emphasis">¿Qué mejorarías del proyecto?</text:span> "Aplicaría SMOTE para balancear las clases, optimizaría hiperparámetros con GridSearchCV, y probaría modelos de ensamblaje como Random Forest o XGBoost que suelen dar mejores resultados."</text:p>
      <text:p text:style-name="Horizontal_20_Line"/>
      <text:p text:style-name="Text_20_body"><text:span text:style-name="Strong_20_Emphasis">SOBRE EL CÓDIGO</text:span></text:p>
      <text:p text:style-name="Text_20_body"><text:span text:style-name="Strong_20_Emphasis">¿Qué es PEP 8?</text:span> "Es la guía de estilo oficial de Python. Define convenciones de formato como usar 4 espacios de indentación, nombres de variables en minúsculas con guiones bajos, comentarios claros y líneas de máximo 79 caracteres."</text:p>
      <text:p text:style-name="Text_20_body"><text:span text:style-name="Strong_20_Emphasis">¿Por qué organizaste el código en funciones?</text:span> "Para que sea modular, reutilizable y fácil de mantener. Cada función tiene una única responsabilidad, lo que facilita la depuración y las prueba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6T11:54:04.018060953</meta:creation-date>
    <dc:date>2026-05-06T11:56:30.549775039</dc:date>
    <meta:editing-duration>PT2M27S</meta:editing-duration>
    <meta:editing-cycles>3</meta:editing-cycles>
    <meta:generator>LibreOffice/7.5.6.2$Linux_X86_64 LibreOffice_project/50$Build-2</meta:generator>
    <meta:document-statistic meta:table-count="0" meta:image-count="0" meta:object-count="0" meta:page-count="2" meta:paragraph-count="22" meta:word-count="669" meta:character-count="4097" meta:non-whitespace-character-count="3450"/>
  </office:meta>
</office:document-meta>
</file>