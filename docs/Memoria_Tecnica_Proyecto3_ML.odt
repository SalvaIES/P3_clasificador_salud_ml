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464cm" fo:margin-left="0.002cm" fo:margin-top="0cm" fo:margin-bottom="0cm" table:align="left" style:writing-mode="page"/>
    </style:style>
    <style:style style:name="Tabla1.A" style:family="table-column">
      <style:table-column-properties style:column-width="3.881cm"/>
    </style:style>
    <style:style style:name="Tabla1.B" style:family="table-column">
      <style:table-column-properties style:column-width="7.938cm"/>
    </style:style>
    <style:style style:name="Tabla1.C" style:family="table-column">
      <style:table-column-properties style:column-width="2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1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C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C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A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B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C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A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B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C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A6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B6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C6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A7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B7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C7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A8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B8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C8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A9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B9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C9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1.A10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B10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1.C10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" style:family="table">
      <style:table-properties style:width="14.464cm" fo:margin-left="0.002cm" fo:margin-top="0cm" fo:margin-bottom="0cm" table:align="left" style:writing-mode="page"/>
    </style:style>
    <style:style style:name="Tabla2.A" style:family="table-column">
      <style:table-column-properties style:column-width="3.526cm"/>
    </style:style>
    <style:style style:name="Tabla2.B" style:family="table-column">
      <style:table-column-properties style:column-width="2.117cm"/>
    </style:style>
    <style:style style:name="Tabla2.C" style:family="table-column">
      <style:table-column-properties style:column-width="8.82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2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.C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2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2.C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2.A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.B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.C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2.A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2.B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2.C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" style:family="table">
      <style:table-properties style:width="14.464cm" fo:margin-left="0.002cm" fo:margin-top="0cm" fo:margin-bottom="0cm" table:align="left" style:writing-mode="page"/>
    </style:style>
    <style:style style:name="Tabla3.A" style:family="table-column">
      <style:table-column-properties style:column-width="5.292cm"/>
    </style:style>
    <style:style style:name="Tabla3.B" style:family="table-column">
      <style:table-column-properties style:column-width="9.1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3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A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B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A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B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A6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B6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3.A7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3.B7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4" style:family="table">
      <style:table-properties style:width="16.228cm" fo:margin-left="0.002cm" fo:margin-top="0cm" fo:margin-bottom="0cm" table:align="left" style:writing-mode="page"/>
    </style:style>
    <style:style style:name="Tabla4.A" style:family="table-column">
      <style:table-column-properties style:column-width="4.937cm"/>
    </style:style>
    <style:style style:name="Tabla4.B" style:family="table-column">
      <style:table-column-properties style:column-width="3.353cm"/>
    </style:style>
    <style:style style:name="Tabla4.C" style:family="table-column">
      <style:table-column-properties style:column-width="4.232cm"/>
    </style:style>
    <style:style style:name="Tabla4.D" style:family="table-column">
      <style:table-column-properties style:column-width="3.704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4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.C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.D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4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4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4.C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4.D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" style:family="table">
      <style:table-properties style:width="16.228cm" fo:margin-left="0.002cm" fo:margin-top="0cm" fo:margin-bottom="0cm" table:align="left" style:writing-mode="page"/>
    </style:style>
    <style:style style:name="Tabla5.A" style:family="table-column">
      <style:table-column-properties style:column-width="6.172cm"/>
    </style:style>
    <style:style style:name="Tabla5.B" style:family="table-column">
      <style:table-column-properties style:column-width="10.054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5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.A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B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A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.B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5.A6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5.B6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6" style:family="table">
      <style:table-properties style:width="16.228cm" fo:margin-left="0.002cm" fo:margin-top="0cm" fo:margin-bottom="0cm" table:align="left" style:writing-mode="page"/>
    </style:style>
    <style:style style:name="Tabla6.A" style:family="table-column">
      <style:table-column-properties style:column-width="2.644cm"/>
    </style:style>
    <style:style style:name="Tabla6.B" style:family="table-column">
      <style:table-column-properties style:column-width="2.118cm"/>
    </style:style>
    <style:style style:name="Tabla6.C" style:family="table-column">
      <style:table-column-properties style:column-width="7.936cm"/>
    </style:style>
    <style:style style:name="Tabla6.D" style:family="table-column">
      <style:table-column-properties style:column-width="3.52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1565c0" fo:padding-left="0.212cm" fo:padding-right="0.212cm" fo:padding-top="0.141cm" fo:padding-bottom="0.141cm" fo:border="0.1pt solid #bbdefb">
        <style:background-image/>
      </style:table-cell-properties>
    </style:style>
    <style:style style:name="Tabla6.A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6.B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6.C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6.D2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6.A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6.B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6.C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6.D3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6.A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6.B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6.C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6.D4" style:family="table-cell">
      <style:table-cell-properties fo:background-color="#ffffff" fo:padding-left="0.212cm" fo:padding-right="0.212cm" fo:padding-top="0.141cm" fo:padding-bottom="0.141cm" fo:border="0.1pt solid #bbdefb">
        <style:background-image/>
      </style:table-cell-properties>
    </style:style>
    <style:style style:name="Tabla6.A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6.B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6.C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Tabla6.D5" style:family="table-cell">
      <style:table-cell-properties fo:background-color="#e3f2fd" fo:padding-left="0.212cm" fo:padding-right="0.212cm" fo:padding-top="0.141cm" fo:padding-bottom="0.141cm" fo:border="0.1pt solid #bbdefb">
        <style:background-image/>
      </style:table-cell-properties>
    </style:style>
    <style:style style:name="P1" style:family="paragraph" style:parent-style-name="Heading_20_1">
      <style:paragraph-properties fo:margin-top="0.706cm" fo:margin-bottom="0.353cm" style:contextual-spacing="false" fo:break-before="page" fo:padding-left="0cm" fo:padding-right="0cm" fo:padding-top="0cm" fo:padding-bottom="0.035cm" fo:border-left="none" fo:border-right="none" fo:border-top="none" fo:border-bottom="0.74pt solid #1565c0"/>
    </style:style>
    <style:style style:name="P2" style:family="paragraph" style:parent-style-name="Heading_20_1">
      <style:paragraph-properties fo:margin-top="0.706cm" fo:margin-bottom="0.353cm" style:contextual-spacing="false" fo:padding-left="0cm" fo:padding-right="0cm" fo:padding-top="0cm" fo:padding-bottom="0.035cm" fo:border-left="none" fo:border-right="none" fo:border-top="none" fo:border-bottom="0.74pt solid #1565c0"/>
    </style:style>
    <style:style style:name="P3" style:family="paragraph" style:parent-style-name="Heading_20_2">
      <style:paragraph-properties fo:margin-top="0.529cm" fo:margin-bottom="0.212cm" style:contextual-spacing="false"/>
    </style:style>
    <style:style style:name="P4" style:family="paragraph" style:parent-style-name="Heading_20_3">
      <style:paragraph-properties fo:margin-top="0.353cm" fo:margin-bottom="0.176cm" style:contextual-spacing="false"/>
    </style:style>
    <style:style style:name="P5" style:family="paragraph" style:parent-style-name="List_20_Paragraph" style:list-style-name="WWNum2">
      <style:paragraph-properties fo:margin-top="0.106cm" fo:margin-bottom="0.106cm" style:contextual-spacing="false"/>
    </style:style>
    <style:style style:name="P6" style:family="paragraph" style:parent-style-name="Standard">
      <style:paragraph-properties fo:margin-top="2.117cm" fo:margin-bottom="0.353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176cm" style:contextual-spacing="false" fo:text-align="center" style:justify-single-word="false"/>
    </style:style>
    <style:style style:name="P8" style:family="paragraph" style:parent-style-name="Standard">
      <style:paragraph-properties fo:margin-top="0.706cm" fo:margin-bottom="0.353cm" style:contextual-spacing="false" fo:text-align="center" style:justify-single-word="false"/>
    </style:style>
    <style:style style:name="P9" style:family="paragraph" style:parent-style-name="Standard">
      <style:paragraph-properties fo:margin-top="0cm" fo:margin-bottom="1.058cm" style:contextual-spacing="false" fo:text-align="center" style:justify-single-word="false"/>
    </style:style>
    <style:style style:name="P10" style:family="paragraph" style:parent-style-name="Standard">
      <style:paragraph-properties fo:margin-top="0.353cm" fo:margin-bottom="0.176cm" style:contextual-spacing="false" fo:text-align="center" style:justify-single-word="false"/>
    </style:style>
    <style:style style:name="P11" style:family="paragraph" style:parent-style-name="Standard">
      <style:paragraph-properties fo:margin-top="1.058cm" fo:margin-bottom="0.176cm" style:contextual-spacing="false" fo:text-align="center" style:justify-single-word="false"/>
    </style:style>
    <style:style style:name="P12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 fo:margin-top="0.141cm" fo:margin-bottom="0.141cm" style:contextual-spacing="false" fo:text-align="justify" style:justify-single-word="false"/>
    </style:style>
    <style:style style:name="P15" style:family="paragraph" style:parent-style-name="Standard">
      <style:paragraph-properties fo:margin-top="0.106cm" fo:margin-bottom="0.106cm" style:contextual-spacing="false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loext:graphic-properties draw:fill="solid" draw:fill-color="#f1f8e9"/>
      <style:paragraph-properties fo:margin-left="1.27cm" fo:margin-right="0cm" fo:margin-top="0.071cm" fo:margin-bottom="0.071cm" style:contextual-spacing="false" fo:text-indent="0cm" style:auto-text-indent="false" fo:background-color="#f1f8e9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1565c0"/>
    </style:style>
    <style:style style:name="T1" style:family="text">
      <style:text-properties fo:color="#546e7a" loext:opacity="100%" style:font-name="Arial" fo:font-size="10pt" style:font-name-asian="Arial2" style:font-size-asian="10pt" style:font-name-complex="Arial2" style:font-size-complex="10pt"/>
    </style:style>
    <style:style style:name="T2" style:family="text">
      <style:text-properties fo:color="#546e7a" loext:opacity="100%" style:font-name="Arial" fo:font-size="11pt" style:font-name-asian="Arial2" style:font-size-asian="11pt" style:font-name-complex="Arial2" style:font-size-complex="11pt"/>
    </style:style>
    <style:style style:name="T3" style:family="text">
      <style:text-properties fo:color="#546e7a" loext:opacity="100%"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4" style:family="text">
      <style:text-properties fo:color="#546e7a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5" style:family="text">
      <style:text-properties fo:color="#546e7a" loext:opacity="100%" style:font-name="Arial" fo:font-size="9pt" style:font-name-asian="Arial2" style:font-size-asian="9pt" style:font-name-complex="Arial2" style:font-size-complex="9pt"/>
    </style:style>
    <style:style style:name="T6" style:family="text">
      <style:text-properties fo:color="#1565c0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7" style:family="text">
      <style:text-properties fo:color="#1565c0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8" style:family="text">
      <style:text-properties fo:color="#1976d2" loext:opacity="100%" style:font-name="Arial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9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style:font-name="Arial" fo:font-size="11pt" style:font-name-asian="Arial2" style:font-size-asian="11pt" style:font-name-complex="Arial2" style:font-size-complex="11pt"/>
    </style:style>
    <style:style style:name="T11" style:family="text">
      <style:text-properties style:font-name="Arial" fo:font-size="10pt" style:font-name-asian="Arial2" style:font-size-asian="10pt" style:font-name-complex="Arial2" style:font-size-complex="10pt"/>
    </style:style>
    <style:style style:name="T12" style:family="text">
      <style:text-properties fo:color="#263238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3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" style:family="text">
      <style:text-properties fo:color="#1b5e20" loext:opacity="100%" style:font-name="Courier New" fo:font-size="9pt" style:font-name-asian="Courier New1" style:font-size-asian="9pt" style:font-name-complex="Courier New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E en Desarrollo de Aplicaciones en Lenguaje Python</text:span></text:p>
      <text:p text:style-name="P7"><text:span text:style-name="T2">Proyecto Final Intermodular — Proyecto 3</text:span></text:p>
      <text:p text:style-name="P8"><text:span text:style-name="T6">CLASIFICADOR DE ESTADO DE SALUD</text:span></text:p>
      <text:p text:style-name="P9"><text:span text:style-name="T8">MEDIANTE MACHINE LEARNING</text:span></text:p>
      <text:p text:style-name="P10"><text:span text:style-name="T3">Memoria Técnica</text:span></text:p>
      <text:p text:style-name="P11"><text:span text:style-name="T9">Alumno/a: </text:span><text:span text:style-name="T10">[Nombre Apellido]</text:span></text:p>
      <text:p text:style-name="P12"><text:span text:style-name="T10">Profesores: Salvador Martínez Bolinches · Aleix Peiró Gallego</text:span></text:p>
      <text:p text:style-name="P12"><text:span text:style-name="T10">IES Font de Sant Lluís <text:s/>| <text:s/>Curso 2025–2026</text:span></text:p>
      <text:p text:style-name="Standard"/>
      <text:h text:style-name="P1" text:outline-level="1"><text:span text:style-name="T7">1. Introducción y descripción del proyecto</text:span></text:h>
      <text:p text:style-name="P14"><text:span text:style-name="T10">En la actualidad, la Inteligencia Artificial y el Big Data permiten procesar grandes volúmenes de datos clínicos para ayudar en la detección temprana de enfermedades. Este proyecto desarrolla un modelo de Machine Learning clásico que, a partir de un conjunto de datos (dataset) en formato CSV, predice si un paciente pertenece a un grupo de riesgo de diabetes basándose en indicadores biomédicos.</text:span></text:p>
      <text:p text:style-name="P15"/>
      <text:p text:style-name="P14"><text:span text:style-name="T10">El ciclo completo del proyecto cubre las siguientes fases:</text:span></text:p>
      <text:list text:style-name="WWNum2">
        <text:list-item text:start-value="1">
          <text:p text:style-name="P5"><text:span text:style-name="T10">Ingesta y limpieza de datos (preprocesamiento)</text:span></text:p>
        </text:list-item>
        <text:list-item>
          <text:p text:style-name="P5"><text:span text:style-name="T10">Análisis Exploratorio de Datos (EDA) con visualizaciones</text:span></text:p>
        </text:list-item>
        <text:list-item>
          <text:p text:style-name="P5"><text:span text:style-name="T10">Entrenamiento y validación del modelo de clasificación</text:span></text:p>
        </text:list-item>
        <text:list-item>
          <text:p text:style-name="P5"><text:span text:style-name="T10">Evaluación de métricas y selección del mejor modelo</text:span></text:p>
        </text:list-item>
      </text:list>
      <text:p text:style-name="P15"/>
      <text:h text:style-name="P3" text:outline-level="2"><text:span text:style-name="T12">1.1 Dataset utilizado</text:span></text:h>
      <text:p text:style-name="P14"><text:span text:style-name="T10">Se utiliza el dataset Pima Indians Diabetes, compuesto por 768 registros de pacientes femeninas de origen Pima con al menos 21 años de edad. Contiene 8 variables predictoras y 1 variable objetivo binaria (0 = sin diabetes, 1 = con diabetes).</text:span>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13"><text:span text:style-name="T13">Variable</text:span></text:p>
            </table:table-cell>
            <table:table-cell table:style-name="Tabla1.A1" office:value-type="string">
              <text:p text:style-name="P13"><text:span text:style-name="T13">Descripción</text:span></text:p>
            </table:table-cell>
            <table:table-cell table:style-name="Tabla1.A1" office:value-type="string">
              <text:p text:style-name="P13"><text:span text:style-name="T13">Tipo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6"><text:span text:style-name="T11">Embarazos</text:span></text:p>
          </table:table-cell>
          <table:table-cell table:style-name="Tabla1.B2" office:value-type="string">
            <text:p text:style-name="P16"><text:span text:style-name="T11">Número de embarazos previos</text:span></text:p>
          </table:table-cell>
          <table:table-cell table:style-name="Tabla1.C2" office:value-type="string">
            <text:p text:style-name="P16"><text:span text:style-name="T11">Entero</text:span></text:p>
          </table:table-cell>
        </table:table-row>
        <table:table-row table:style-name="Tabla1.1">
          <table:table-cell table:style-name="Tabla1.A3" office:value-type="string">
            <text:p text:style-name="P16"><text:span text:style-name="T11">Glucosa</text:span></text:p>
          </table:table-cell>
          <table:table-cell table:style-name="Tabla1.B3" office:value-type="string">
            <text:p text:style-name="P16"><text:span text:style-name="T11">Concentración de glucosa en plasma (mg/dL)</text:span></text:p>
          </table:table-cell>
          <table:table-cell table:style-name="Tabla1.C3" office:value-type="string">
            <text:p text:style-name="P16"><text:span text:style-name="T11">Decimal</text:span></text:p>
          </table:table-cell>
        </table:table-row>
        <table:table-row table:style-name="Tabla1.1">
          <table:table-cell table:style-name="Tabla1.A4" office:value-type="string">
            <text:p text:style-name="P16"><text:span text:style-name="T11">PresionArterial</text:span></text:p>
          </table:table-cell>
          <table:table-cell table:style-name="Tabla1.B4" office:value-type="string">
            <text:p text:style-name="P16"><text:span text:style-name="T11">Presión arterial diastólica (mm Hg)</text:span></text:p>
          </table:table-cell>
          <table:table-cell table:style-name="Tabla1.C4" office:value-type="string">
            <text:p text:style-name="P16"><text:span text:style-name="T11">Decimal</text:span></text:p>
          </table:table-cell>
        </table:table-row>
        <table:table-row table:style-name="Tabla1.1">
          <table:table-cell table:style-name="Tabla1.A5" office:value-type="string">
            <text:p text:style-name="P16"><text:span text:style-name="T11">GrosorPiel</text:span></text:p>
          </table:table-cell>
          <table:table-cell table:style-name="Tabla1.B5" office:value-type="string">
            <text:p text:style-name="P16"><text:span text:style-name="T11">Grosor del pliegue cutáneo del tríceps (mm)</text:span></text:p>
          </table:table-cell>
          <table:table-cell table:style-name="Tabla1.C5" office:value-type="string">
            <text:p text:style-name="P16"><text:span text:style-name="T11">Decimal</text:span></text:p>
          </table:table-cell>
        </table:table-row>
        <table:table-row table:style-name="Tabla1.1">
          <table:table-cell table:style-name="Tabla1.A6" office:value-type="string">
            <text:p text:style-name="P16"><text:span text:style-name="T11">Insulina</text:span></text:p>
          </table:table-cell>
          <table:table-cell table:style-name="Tabla1.B6" office:value-type="string">
            <text:p text:style-name="P16"><text:span text:style-name="T11">Insulina sérica a las 2 horas (mu U/ml)</text:span></text:p>
          </table:table-cell>
          <table:table-cell table:style-name="Tabla1.C6" office:value-type="string">
            <text:p text:style-name="P16"><text:span text:style-name="T11">Decimal</text:span></text:p>
          </table:table-cell>
        </table:table-row>
        <table:table-row table:style-name="Tabla1.1">
          <table:table-cell table:style-name="Tabla1.A7" office:value-type="string">
            <text:p text:style-name="P16"><text:span text:style-name="T11">IMC</text:span></text:p>
          </table:table-cell>
          <table:table-cell table:style-name="Tabla1.B7" office:value-type="string">
            <text:p text:style-name="P16"><text:span text:style-name="T11">Índice de Masa Corporal (kg/m²)</text:span></text:p>
          </table:table-cell>
          <table:table-cell table:style-name="Tabla1.C7" office:value-type="string">
            <text:p text:style-name="P16"><text:span text:style-name="T11">Decimal</text:span></text:p>
          </table:table-cell>
        </table:table-row>
        <table:table-row table:style-name="Tabla1.1">
          <table:table-cell table:style-name="Tabla1.A8" office:value-type="string">
            <text:p text:style-name="P16"><text:span text:style-name="T11">FuncionDiabetes</text:span></text:p>
          </table:table-cell>
          <table:table-cell table:style-name="Tabla1.B8" office:value-type="string">
            <text:p text:style-name="P16"><text:span text:style-name="T11">Función pedigrí de diabetes (hereditaria)</text:span></text:p>
          </table:table-cell>
          <table:table-cell table:style-name="Tabla1.C8" office:value-type="string">
            <text:p text:style-name="P16"><text:span text:style-name="T11">Decimal</text:span></text:p>
          </table:table-cell>
        </table:table-row>
        <table:table-row table:style-name="Tabla1.1">
          <table:table-cell table:style-name="Tabla1.A9" office:value-type="string">
            <text:p text:style-name="P16"><text:span text:style-name="T11">Edad</text:span></text:p>
          </table:table-cell>
          <table:table-cell table:style-name="Tabla1.B9" office:value-type="string">
            <text:p text:style-name="P16"><text:span text:style-name="T11">Edad del paciente (años)</text:span></text:p>
          </table:table-cell>
          <table:table-cell table:style-name="Tabla1.C9" office:value-type="string">
            <text:p text:style-name="P16"><text:span text:style-name="T11">Entero</text:span></text:p>
          </table:table-cell>
        </table:table-row>
        <table:table-row table:style-name="Tabla1.1">
          <table:table-cell table:style-name="Tabla1.A10" office:value-type="string">
            <text:p text:style-name="P16"><text:span text:style-name="T11">Resultado</text:span></text:p>
          </table:table-cell>
          <table:table-cell table:style-name="Tabla1.B10" office:value-type="string">
            <text:p text:style-name="P16"><text:span text:style-name="T11">Diagnóstico: 0 = No diabetes / 1 = Diabetes</text:span></text:p>
          </table:table-cell>
          <table:table-cell table:style-name="Tabla1.C10" office:value-type="string">
            <text:p text:style-name="P16"><text:span text:style-name="T11">Binaria</text:span></text:p>
          </table:table-cell>
        </table:table-row>
      </table:table>
      <text:p text:style-name="Standard"/>
      <text:h text:style-name="P1" text:outline-level="1"><text:span text:style-name="T7">2. Librerías y tecnologías utilizadas</text:span></text:h>
      <text:p text:style-name="P14"><text:span text:style-name="T10">El proyecto se desarrolla íntegramente en Python 3.12, siguiendo los estándares de calidad PEP 8. Las librerías empleadas son:</text:span></text:p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13"><text:span text:style-name="T13">Librería</text:span></text:p>
            </table:table-cell>
            <table:table-cell table:style-name="Tabla2.A1" office:value-type="string">
              <text:p text:style-name="P13"><text:span text:style-name="T13">Versión</text:span></text:p>
            </table:table-cell>
            <table:table-cell table:style-name="Tabla2.A1" office:value-type="string">
              <text:p text:style-name="P13"><text:span text:style-name="T13">Uso en el proyecto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16"><text:span text:style-name="T11">numpy</text:span></text:p>
          </table:table-cell>
          <table:table-cell table:style-name="Tabla2.B2" office:value-type="string">
            <text:p text:style-name="P16"><text:span text:style-name="T11">≥ 1.24</text:span></text:p>
          </table:table-cell>
          <table:table-cell table:style-name="Tabla2.C2" office:value-type="string">
            <text:p text:style-name="P16"><text:span text:style-name="T11">Operaciones numéricas, arrays, generación de datos</text:span></text:p>
          </table:table-cell>
        </table:table-row>
        <table:table-row table:style-name="Tabla2.1">
          <table:table-cell table:style-name="Tabla2.A3" office:value-type="string">
            <text:p text:style-name="P16"><text:span text:style-name="T11">pandas</text:span></text:p>
          </table:table-cell>
          <table:table-cell table:style-name="Tabla2.B3" office:value-type="string">
            <text:p text:style-name="P16"><text:span text:style-name="T11">≥ 2.0</text:span></text:p>
          </table:table-cell>
          <table:table-cell table:style-name="Tabla2.C3" office:value-type="string">
            <text:p text:style-name="P16"><text:span text:style-name="T11">Carga del CSV, DataFrames, limpieza y análisis</text:span></text:p>
          </table:table-cell>
        </table:table-row>
        <table:table-row table:style-name="Tabla2.1">
          <table:table-cell table:style-name="Tabla2.A4" office:value-type="string">
            <text:p text:style-name="P16"><text:span text:style-name="T11">matplotlib</text:span></text:p>
          </table:table-cell>
          <table:table-cell table:style-name="Tabla2.B4" office:value-type="string">
            <text:p text:style-name="P16"><text:span text:style-name="T11">≥ 3.7</text:span></text:p>
          </table:table-cell>
          <table:table-cell table:style-name="Tabla2.C4" office:value-type="string">
            <text:p text:style-name="P16"><text:span text:style-name="T11">Gráficas de distribución, dispersión y correlación</text:span></text:p>
          </table:table-cell>
        </table:table-row>
        <table:table-row table:style-name="Tabla2.1">
          <table:table-cell table:style-name="Tabla2.A5" office:value-type="string">
            <text:p text:style-name="P16"><text:span text:style-name="T11">scikit-learn</text:span></text:p>
          </table:table-cell>
          <table:table-cell table:style-name="Tabla2.B5" office:value-type="string">
            <text:p text:style-name="P16"><text:span text:style-name="T11">≥ 1.3</text:span></text:p>
          </table:table-cell>
          <table:table-cell table:style-name="Tabla2.C5" office:value-type="string">
            <text:p text:style-name="P16"><text:span text:style-name="T11">Modelos ML, normalización, validación cruzada, métricas</text:span></text:p>
          </table:table-cell>
        </table:table-row>
      </table:table>
      <text:p text:style-name="P15"/>
      <text:h text:style-name="P3" text:outline-level="2"><text:span text:style-name="T12">2.1 Instalación del entorno</text:span></text:h>
      <text:p text:style-name="P14"><text:span text:style-name="T10">Se recomienda crear un entorno virtual para aislar las dependencias:</text:span></text:p>
      <text:p text:style-name="P17"><text:span text:style-name="T14">python -m venv venv</text:span></text:p>
      <text:p text:style-name="P17"><text:span text:style-name="T14">source venv/bin/activate <text:s text:c="8"/># Linux / macOS</text:span></text:p>
      <text:p text:style-name="P17"><text:span text:style-name="T14">venv\Scripts\activate <text:s text:c="11"/># Windows</text:span></text:p>
      <text:p text:style-name="P17"><text:span text:style-name="T14">pip install numpy pandas matplotlib scikit-learn</text:span></text:p>
      <text:p text:style-name="P15"/>
      <text:p text:style-name="Standard"/>
      <text:h text:style-name="P1" text:outline-level="1"><text:span text:style-name="T7">3. Arquitectura del pipeline ML</text:span></text:h>
      <text:p text:style-name="P14"><text:span text:style-name="T10">El código se organiza en funciones independientes y reutilizables, siguiendo una arquitectura de pipeline secuencial. Cada etapa recibe datos, los transforma y los pasa a la siguiente.</text:span></text:p>
      <text:p text:style-name="P15"/>
      <text:h text:style-name="P3" text:outline-level="2"><text:span text:style-name="T12">3.1 Estructura de módulos</text:span></text:h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3"><text:span text:style-name="T13">Función</text:span></text:p>
            </table:table-cell>
            <table:table-cell table:style-name="Tabla3.A1" office:value-type="string">
              <text:p text:style-name="P13"><text:span text:style-name="T13">Responsabilidad</text:span>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16"><text:span text:style-name="T11">descargar_dataset()</text:span></text:p>
          </table:table-cell>
          <table:table-cell table:style-name="Tabla3.B2" office:value-type="string">
            <text:p text:style-name="P16"><text:span text:style-name="T11">Descarga el CSV desde URL o valida existencia local</text:span></text:p>
          </table:table-cell>
        </table:table-row>
        <table:table-row table:style-name="Tabla3.1">
          <table:table-cell table:style-name="Tabla3.A3" office:value-type="string">
            <text:p text:style-name="P16"><text:span text:style-name="T11">cargar_datos()</text:span></text:p>
          </table:table-cell>
          <table:table-cell table:style-name="Tabla3.B3" office:value-type="string">
            <text:p text:style-name="P16"><text:span text:style-name="T11">Lee el CSV con pandas y asigna nombres de columnas</text:span></text:p>
          </table:table-cell>
        </table:table-row>
        <table:table-row table:style-name="Tabla3.1">
          <table:table-cell table:style-name="Tabla3.A4" office:value-type="string">
            <text:p text:style-name="P16"><text:span text:style-name="T11">preprocesar()</text:span></text:p>
          </table:table-cell>
          <table:table-cell table:style-name="Tabla3.B4" office:value-type="string">
            <text:p text:style-name="P16"><text:span text:style-name="T11">Reemplaza ceros inválidos, imputa con mediana, corrige tipos</text:span></text:p>
          </table:table-cell>
        </table:table-row>
        <table:table-row table:style-name="Tabla3.1">
          <table:table-cell table:style-name="Tabla3.A5" office:value-type="string">
            <text:p text:style-name="P16"><text:span text:style-name="T11">eda()</text:span></text:p>
          </table:table-cell>
          <table:table-cell table:style-name="Tabla3.B5" office:value-type="string">
            <text:p text:style-name="P16"><text:span text:style-name="T11">Genera 3 gráficas: distribuciones, dispersión y correlación</text:span></text:p>
          </table:table-cell>
        </table:table-row>
        <table:table-row table:style-name="Tabla3.1">
          <table:table-cell table:style-name="Tabla3.A6" office:value-type="string">
            <text:p text:style-name="P16"><text:span text:style-name="T11">entrenar_y_evaluar()</text:span></text:p>
          </table:table-cell>
          <table:table-cell table:style-name="Tabla3.B6" office:value-type="string">
            <text:p text:style-name="P16"><text:span text:style-name="T11">Divide, normaliza, entrena 2 modelos, evalúa y compara</text:span></text:p>
          </table:table-cell>
        </table:table-row>
        <table:table-row table:style-name="Tabla3.1">
          <table:table-cell table:style-name="Tabla3.A7" office:value-type="string">
            <text:p text:style-name="P16"><text:span text:style-name="T11">main()</text:span></text:p>
          </table:table-cell>
          <table:table-cell table:style-name="Tabla3.B7" office:value-type="string">
            <text:p text:style-name="P16"><text:span text:style-name="T11">Orquesta el pipeline completo en orden secuencial</text:span></text:p>
          </table:table-cell>
        </table:table-row>
      </table:table>
      <text:p text:style-name="P15"/>
      <text:h text:style-name="P3" text:outline-level="2"><text:span text:style-name="T12">3.2 Preprocesamiento de datos</text:span></text:h>
      <text:p text:style-name="P14"><text:span text:style-name="T10">El dataset Pima Indians codifica los datos ausentes como ceros en variables biomédicas donde un valor cero es imposible (glucosa = 0, presión = 0, etc.). El preprocesamiento realiza:</text:span></text:p>
      <text:list text:continue-numbering="true" text:style-name="WWNum2">
        <text:list-item>
          <text:p text:style-name="P5"><text:span text:style-name="T10">Sustitución de ceros inválidos por NaN en las columnas: Glucosa, PresionArterial, GrosorPiel, Insulina e IMC.</text:span></text:p>
        </text:list-item>
        <text:list-item>
          <text:p text:style-name="P5"><text:span text:style-name="T10">Imputación de valores nulos con la mediana de cada columna. Se elige la mediana (en lugar de la media) por su robustez frente a valores atípicos.</text:span></text:p>
        </text:list-item>
        <text:list-item>
          <text:p text:style-name="P5"><text:span text:style-name="T10">Verificación de tipos de datos con pd.to_numeric() para garantizar la consistencia numérica.</text:span></text:p>
        </text:list-item>
      </text:list>
      <text:p text:style-name="P15"/>
      <text:h text:style-name="P4" text:outline-level="3"><text:span text:style-name="T4">Fragmento de código — Preprocesamiento</text:span></text:h>
      <text:p text:style-name="P17"><text:span text:style-name="T14">df[cols_nulos] = df[cols_nulos].replace(0, np.nan)</text:span></text:p>
      <text:p text:style-name="P17"><text:span text:style-name="T14">for col in cols_nulos:</text:span></text:p>
      <text:p text:style-name="P17"><text:span text:style-name="T14"><text:s text:c="4"/>mediana = df[col].median()</text:span></text:p>
      <text:p text:style-name="P17"><text:span text:style-name="T14"><text:s text:c="4"/>df[col] = df[col].fillna(mediana)</text:span></text:p>
      <text:p text:style-name="P15"/>
      <text:h text:style-name="P3" text:outline-level="2"><text:span text:style-name="T12">3.3 Análisis Exploratorio (EDA)</text:span></text:h>
      <text:p text:style-name="P14"><text:span text:style-name="T10">Se generan tres gráficas guardadas en la carpeta graficas/:</text:span></text:p>
      <text:list text:continue-numbering="true" text:style-name="WWNum2">
        <text:list-item>
          <text:p text:style-name="P5"><text:span text:style-name="T10">01_distribuciones.png: Histogramas comparativos de Glucosa, IMC, Edad y PresionArterial por clase (azul = sano, rojo = diabetes). Permite identificar diferencias en la distribución de cada variable según el diagnóstico.</text:span></text:p>
        </text:list-item>
        <text:list-item>
          <text:p text:style-name="P5"><text:soft-page-break/><text:span text:style-name="T10">02_dispersion_glucosa_edad.png: Diagrama de dispersión Edad vs. Glucosa coloreado por clase. Evidencia la correlación positiva entre niveles altos de glucosa, mayor edad y riesgo de diabetes.</text:span></text:p>
        </text:list-item>
        <text:list-item>
          <text:p text:style-name="P5"><text:span text:style-name="T10">03_matriz_correlacion.png: Heatmap de correlación entre todas las variables. La glucosa muestra la mayor correlación con el diagnóstico (≈0.49), seguida del IMC (≈0.29) y la edad (≈0.24).</text:span></text:p>
        </text:list-item>
      </text:list>
      <text:p text:style-name="Standard"/>
      <text:h text:style-name="P1" text:outline-level="1"><text:span text:style-name="T7">4. Modelos de clasificación</text:span></text:h>
      <text:p text:style-name="P14"><text:span text:style-name="T10">Se comparan dos algoritmos de clasificación supervisada. Para ambos se aplica StandardScaler (normalización z-score) y validación cruzada de 5 pliegues sobre el conjunto de entrenamiento.</text:span></text:p>
      <text:p text:style-name="P15"/>
      <text:h text:style-name="P3" text:outline-level="2"><text:span text:style-name="T12">4.1 Árbol de Decisión (Decision Tree)</text:span></text:h>
      <text:p text:style-name="P14"><text:span text:style-name="T10">El árbol de decisión divide el espacio de características en regiones mediante reglas de decisión binarias aprendidas durante el entrenamiento. Se configura con profundidad máxima de 5 niveles para evitar el sobreajuste.</text:span></text:p>
      <text:list text:continue-numbering="true" text:style-name="WWNum2">
        <text:list-item>
          <text:p text:style-name="P5"><text:span text:style-name="T10">Ventajas: Interpretable, no requiere normalización, maneja variables mixtas.</text:span></text:p>
        </text:list-item>
        <text:list-item>
          <text:p text:style-name="P5"><text:span text:style-name="T10">Limitaciones: Tendencia al sobreajuste sin poda; sensible a pequeños cambios en los datos.</text:span></text:p>
        </text:list-item>
        <text:list-item>
          <text:p text:style-name="P5"><text:span text:style-name="T10">Hiperparámetros: max_depth=5, criterion='gini', random_state=42.</text:span></text:p>
        </text:list-item>
      </text:list>
      <text:p text:style-name="P15"/>
      <text:h text:style-name="P3" text:outline-level="2"><text:span text:style-name="T12">4.2 K-Nearest Neighbors (KNN)</text:span></text:h>
      <text:p text:style-name="P14"><text:span text:style-name="T10">KNN clasifica una muestra nueva según la clase mayoritaria entre sus k vecinos más cercanos en el espacio de características. Se utiliza k=7 y distancia euclidiana.</text:span></text:p>
      <text:list text:continue-numbering="true" text:style-name="WWNum2">
        <text:list-item>
          <text:p text:style-name="P5"><text:span text:style-name="T10">Ventajas: Simple, sin fase de entrenamiento explícita (lazy learning), eficaz con datos bien normalizados.</text:span></text:p>
        </text:list-item>
        <text:list-item>
          <text:p text:style-name="P5"><text:span text:style-name="T10">Limitaciones: Lento en predicción con datasets grandes; sensible a la escala de variables (requiere normalización).</text:span></text:p>
        </text:list-item>
        <text:list-item>
          <text:p text:style-name="P5"><text:span text:style-name="T10">Hiperparámetros: n_neighbors=7, metric='euclidean'.</text:span></text:p>
        </text:list-item>
      </text:list>
      <text:p text:style-name="P15"/>
      <text:h text:style-name="P3" text:outline-level="2"><text:span text:style-name="T12">4.3 División de datos y normalización</text:span></text:h>
      <text:p text:style-name="P14"><text:span text:style-name="T10">Los datos se dividen en 80% entrenamiento y 20% prueba, manteniendo la proporción de clases (stratify=y). La normalización con StandardScaler se ajusta solo sobre el conjunto de entrenamiento y luego se aplica al de prueba, evitando la fuga de información (data leakage).</text:span></text:p>
      <text:p text:style-name="P17"><text:span text:style-name="T14">X_train, X_test, y_train, y_test = train_test_split(</text:span></text:p>
      <text:p text:style-name="P17"><text:span text:style-name="T14"><text:s text:c="4"/>X, y, test_size=0.20, random_state=42, stratify=y</text:span></text:p>
      <text:p text:style-name="P17"><text:span text:style-name="T14">)</text:span></text:p>
      <text:p text:style-name="P17"><text:span text:style-name="T14">scaler = StandardScaler()</text:span></text:p>
      <text:p text:style-name="P17"><text:span text:style-name="T14">X_train_sc = scaler.fit_transform(X_train)</text:span></text:p>
      <text:p text:style-name="P17"><text:span text:style-name="T14">X_test_sc <text:s/>= scaler.transform(X_test) <text:s text:c="2"/># solo transform, sin fit</text:span></text:p>
      <text:p text:style-name="P15"/>
      <text:p text:style-name="Standard"/>
      <text:h text:style-name="P1" text:outline-level="1"><text:span text:style-name="T7">5. Resultados y evaluación</text:span></text:h>
      <text:p text:style-name="P14"><text:span text:style-name="T10">La evaluación se realiza sobre el 20% de datos no vistos durante el entrenamiento. Se reportan accuracy, precision, recall y F1-score para ambas clases.</text:span></text:p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 table:style-name="Tabla4.1">
            <table:table-cell table:style-name="Tabla4.A1" office:value-type="string">
              <text:p text:style-name="P13"><text:span text:style-name="T13">Modelo</text:span></text:p>
            </table:table-cell>
            <table:table-cell table:style-name="Tabla4.A1" office:value-type="string">
              <text:p text:style-name="P13"><text:span text:style-name="T13">Accuracy Test</text:span></text:p>
            </table:table-cell>
            <table:table-cell table:style-name="Tabla4.A1" office:value-type="string">
              <text:p text:style-name="P13"><text:span text:style-name="T13">CV Accuracy (5-fold)</text:span></text:p>
            </table:table-cell>
            <table:table-cell table:style-name="Tabla4.A1" office:value-type="string">
              <text:p text:style-name="P13"><text:span text:style-name="T13">Mejor para</text:span>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6"><text:span text:style-name="T11">Árbol de Decisión</text:span></text:p>
          </table:table-cell>
          <table:table-cell table:style-name="Tabla4.B2" office:value-type="string">
            <text:p text:style-name="P16"><text:span text:style-name="T11">~81%</text:span></text:p>
          </table:table-cell>
          <table:table-cell table:style-name="Tabla4.C2" office:value-type="string">
            <text:p text:style-name="P16"><text:span text:style-name="T11">~84% ± 1.6%</text:span></text:p>
          </table:table-cell>
          <table:table-cell table:style-name="Tabla4.D2" office:value-type="string">
            <text:p text:style-name="P16"><text:span text:style-name="T11">Interpretabilidad</text:span></text:p>
          </table:table-cell>
        </table:table-row>
        <table:table-row table:style-name="Tabla4.1">
          <table:table-cell table:style-name="Tabla4.A3" office:value-type="string">
            <text:p text:style-name="P16"><text:span text:style-name="T11">KNN (k=7)</text:span></text:p>
          </table:table-cell>
          <table:table-cell table:style-name="Tabla4.B3" office:value-type="string">
            <text:p text:style-name="P16"><text:span text:style-name="T11">~85%</text:span></text:p>
          </table:table-cell>
          <table:table-cell table:style-name="Tabla4.C3" office:value-type="string">
            <text:p text:style-name="P16"><text:span text:style-name="T11">~88% ± 2.5%</text:span></text:p>
          </table:table-cell>
          <table:table-cell table:style-name="Tabla4.D3" office:value-type="string">
            <text:p text:style-name="P16"><text:span text:style-name="T11">Precisión global</text:span></text:p>
          </table:table-cell>
        </table:table-row>
      </table:table>
      <text:p text:style-name="P15"/>
      <text:h text:style-name="P3" text:outline-level="2"><text:span text:style-name="T12">5.1 Interpretación de métricas</text:span></text:h>
      <text:p text:style-name="P14"><text:span text:style-name="T10">La precisión (accuracy) indica el porcentaje total de predicciones correctas. Sin embargo, dado el desbalance de clases (65% sin diabetes / 35% con diabetes), se analiza también el F1-score por clase:</text:span></text:p>
      <text:list text:continue-numbering="true" text:style-name="WWNum2">
        <text:list-item>
          <text:p text:style-name="P5"><text:span text:style-name="T10">Clase 0 (Sin diabetes): F1 ≈ 0.89. El modelo clasifica correctamente a la mayoría de pacientes sanos.</text:span></text:p>
        </text:list-item>
        <text:list-item>
          <text:p text:style-name="P5"><text:span text:style-name="T10">Clase 1 (Con diabetes): F1 ≈ 0.76. La detección de verdaderos positivos (recall) es el aspecto más crítico en contexto clínico.</text:span></text:p>
        </text:list-item>
        <text:list-item>
          <text:p text:style-name="P5"><text:span text:style-name="T10">Elección del modelo: KNN obtiene mayor accuracy en test. En producción real, se priorizaría el recall de la clase positiva para minimizar falsos negativos.</text:span></text:p>
        </text:list-item>
      </text:list>
      <text:p text:style-name="P15"/>
      <text:h text:style-name="P3" text:outline-level="2"><text:span text:style-name="T12">5.2 Justificación de decisiones de diseño</text:span></text:h>
      <text:list text:continue-numbering="true" text:style-name="WWNum2">
        <text:list-item>
          <text:p text:style-name="P5"><text:span text:style-name="T10">Mediana para imputación: Más robusta que la media frente a valores extremos presentes en variables como Insulina.</text:span></text:p>
        </text:list-item>
        <text:list-item>
          <text:p text:style-name="P5"><text:span text:style-name="T10">Stratify en la división: Asegura que ambas clases estén representadas proporcionalmente en entrenamiento y test.</text:span></text:p>
        </text:list-item>
        <text:list-item>
          <text:p text:style-name="P5"><text:span text:style-name="T10">StandardScaler: Imprescindible para KNN (basado en distancias); mejora también la convergencia del árbol.</text:span></text:p>
        </text:list-item>
        <text:list-item>
          <text:p text:style-name="P5"><text:span text:style-name="T10">max_depth=5 en el árbol: Equilibrio entre capacidad expresiva y control del sobreajuste.</text:span></text:p>
        </text:list-item>
        <text:list-item>
          <text:p text:style-name="P5"><text:span text:style-name="T10">k=7 en KNN: Valor impar que evita empates; validado mediante cross-validation.</text:span></text:p>
        </text:list-item>
      </text:list>
      <text:p text:style-name="Standard"/>
      <text:h text:style-name="P1" text:outline-level="1"><text:span text:style-name="T7">6. Manual de usuario</text:span></text:h>
      <text:h text:style-name="P3" text:outline-level="2"><text:span text:style-name="T12">6.1 Requisitos previos</text:span></text:h>
      <text:p text:style-name="P14"><text:span text:style-name="T10">Python 3.9 o superior instalado en el sistema. Conexión a internet para la primera descarga del dataset (o disponer del archivo diabetes.csv en el mismo directorio).</text:span></text:p>
      <text:p text:style-name="P15"/>
      <text:h text:style-name="P3" text:outline-level="2"><text:span text:style-name="T12">6.2 Instalación de dependencias</text:span></text:h>
      <text:p text:style-name="P17"><text:span text:style-name="T14">pip install numpy pandas matplotlib scikit-learn</text:span></text:p>
      <text:p text:style-name="P15"/>
      <text:h text:style-name="P3" text:outline-level="2"><text:span text:style-name="T12">6.3 Ejecución</text:span></text:h>
      <text:p text:style-name="P14"><text:span text:style-name="T10">Coloca el archivo clasificador_salud.py en una carpeta y ejecuta:</text:span></text:p>
      <text:p text:style-name="P17"><text:span text:style-name="T14">python clasificador_salud.py</text:span></text:p>
      <text:p text:style-name="P14"><text:span text:style-name="T10">El script descargará el dataset automáticamente (si no existe localmente), procesará los datos, generará las gráficas en la subcarpeta graficas/ y mostrará las métricas en consola.</text:span></text:p>
      <text:p text:style-name="P15"/>
      <text:h text:style-name="P3" text:outline-level="2"><text:span text:style-name="T12">6.4 Archivos generados</text:span></text:h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13"><text:span text:style-name="T13">Archivo</text:span></text:p>
            </table:table-cell>
            <table:table-cell table:style-name="Tabla5.A1" office:value-type="string">
              <text:p text:style-name="P13"><text:span text:style-name="T13">Descripción</text:span>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16"><text:span text:style-name="T11">diabetes.csv</text:span></text:p>
          </table:table-cell>
          <table:table-cell table:style-name="Tabla5.B2" office:value-type="string">
            <text:p text:style-name="P16"><text:span text:style-name="T11">Dataset clínico descargado automáticamente</text:span></text:p>
          </table:table-cell>
        </table:table-row>
        <table:table-row table:style-name="Tabla5.1">
          <table:table-cell table:style-name="Tabla5.A3" office:value-type="string">
            <text:p text:style-name="P16"><text:span text:style-name="T11">graficas/01_distribuciones.png</text:span></text:p>
          </table:table-cell>
          <table:table-cell table:style-name="Tabla5.B3" office:value-type="string">
            <text:p text:style-name="P16"><text:span text:style-name="T11">Histogramas por variable y clase</text:span></text:p>
          </table:table-cell>
        </table:table-row>
        <table:table-row table:style-name="Tabla5.1">
          <table:table-cell table:style-name="Tabla5.A4" office:value-type="string">
            <text:p text:style-name="P16"><text:span text:style-name="T11">graficas/02_dispersion_glucosa_edad.png</text:span></text:p>
          </table:table-cell>
          <table:table-cell table:style-name="Tabla5.B4" office:value-type="string">
            <text:p text:style-name="P16"><text:span text:style-name="T11">Diagrama de dispersión Glucosa vs Edad</text:span></text:p>
          </table:table-cell>
        </table:table-row>
        <table:table-row table:style-name="Tabla5.1">
          <table:table-cell table:style-name="Tabla5.A5" office:value-type="string">
            <text:p text:style-name="P16"><text:span text:style-name="T11">graficas/03_matriz_correlacion.png</text:span></text:p>
          </table:table-cell>
          <table:table-cell table:style-name="Tabla5.B5" office:value-type="string">
            <text:p text:style-name="P16"><text:span text:style-name="T11">Mapa de calor de correlaciones</text:span></text:p>
          </table:table-cell>
        </table:table-row>
        <table:table-row table:style-name="Tabla5.1">
          <table:table-cell table:style-name="Tabla5.A6" office:value-type="string">
            <text:p text:style-name="P16"><text:span text:style-name="T11">graficas/04_matriz_confusion.png</text:span></text:p>
          </table:table-cell>
          <table:table-cell table:style-name="Tabla5.B6" office:value-type="string">
            <text:p text:style-name="P16"><text:span text:style-name="T11">Matriz de confusión del mejor modelo</text:span></text:p>
          </table:table-cell>
        </table:table-row>
      </table:table>
      <text:p text:style-name="P15"/>
      <text:p text:style-name="Standard"/>
      <text:h text:style-name="P1" text:outline-level="1"><text:span text:style-name="T7">7. Planificación — Seguimiento de hitos (Scrum)</text:span>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 table:style-name="Tabla6.1">
            <table:table-cell table:style-name="Tabla6.A1" office:value-type="string">
              <text:p text:style-name="P13"><text:span text:style-name="T13">Hito</text:span></text:p>
            </table:table-cell>
            <table:table-cell table:style-name="Tabla6.A1" office:value-type="string">
              <text:p text:style-name="P13"><text:span text:style-name="T13">Semana</text:span></text:p>
            </table:table-cell>
            <table:table-cell table:style-name="Tabla6.A1" office:value-type="string">
              <text:p text:style-name="P13"><text:span text:style-name="T13">Tareas completadas</text:span></text:p>
            </table:table-cell>
            <table:table-cell table:style-name="Tabla6.A1" office:value-type="string">
              <text:p text:style-name="P13"><text:span text:style-name="T13">Estado</text:span>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16"><text:span text:style-name="T11">Hito 1</text:span></text:p>
          </table:table-cell>
          <table:table-cell table:style-name="Tabla6.B2" office:value-type="string">
            <text:p text:style-name="P16"><text:span text:style-name="T11">Sem. 1</text:span></text:p>
          </table:table-cell>
          <table:table-cell table:style-name="Tabla6.C2" office:value-type="string">
            <text:p text:style-name="P16"><text:span text:style-name="T11">Selección del dataset, product backlog, repositorio GitHub</text:span></text:p>
          </table:table-cell>
          <table:table-cell table:style-name="Tabla6.D2" office:value-type="string">
            <text:p text:style-name="P16"><text:span text:style-name="T11">✔ Completado</text:span></text:p>
          </table:table-cell>
        </table:table-row>
        <table:table-row table:style-name="Tabla6.1">
          <table:table-cell table:style-name="Tabla6.A3" office:value-type="string">
            <text:p text:style-name="P16"><text:span text:style-name="T11">Hito 2</text:span></text:p>
          </table:table-cell>
          <table:table-cell table:style-name="Tabla6.B3" office:value-type="string">
            <text:p text:style-name="P16"><text:span text:style-name="T11">Sem. 2</text:span></text:p>
          </table:table-cell>
          <table:table-cell table:style-name="Tabla6.C3" office:value-type="string">
            <text:p text:style-name="P16"><text:span text:style-name="T11">Carga, limpieza de datos, EDA (3 gráficas)</text:span></text:p>
          </table:table-cell>
          <table:table-cell table:style-name="Tabla6.D3" office:value-type="string">
            <text:p text:style-name="P16"><text:span text:style-name="T11">✔ Completado</text:span></text:p>
          </table:table-cell>
        </table:table-row>
        <table:table-row table:style-name="Tabla6.1">
          <table:table-cell table:style-name="Tabla6.A4" office:value-type="string">
            <text:p text:style-name="P16"><text:span text:style-name="T11">Hito 3</text:span></text:p>
          </table:table-cell>
          <table:table-cell table:style-name="Tabla6.B4" office:value-type="string">
            <text:p text:style-name="P16"><text:span text:style-name="T11">Sem. 3</text:span></text:p>
          </table:table-cell>
          <table:table-cell table:style-name="Tabla6.C4" office:value-type="string">
            <text:p text:style-name="P16"><text:span text:style-name="T11">Entrenamiento, validación cruzada, métricas PEP8</text:span></text:p>
          </table:table-cell>
          <table:table-cell table:style-name="Tabla6.D4" office:value-type="string">
            <text:p text:style-name="P16"><text:span text:style-name="T11">✔ Completado</text:span></text:p>
          </table:table-cell>
        </table:table-row>
        <table:table-row table:style-name="Tabla6.1">
          <table:table-cell table:style-name="Tabla6.A5" office:value-type="string">
            <text:p text:style-name="P16"><text:span text:style-name="T11">Hito 4</text:span></text:p>
          </table:table-cell>
          <table:table-cell table:style-name="Tabla6.B5" office:value-type="string">
            <text:p text:style-name="P16"><text:span text:style-name="T11">Sem. 4</text:span></text:p>
          </table:table-cell>
          <table:table-cell table:style-name="Tabla6.C5" office:value-type="string">
            <text:p text:style-name="P16"><text:span text:style-name="T11">Entrega en GitHub, memoria técnica, defensa oral</text:span></text:p>
          </table:table-cell>
          <table:table-cell table:style-name="Tabla6.D5" office:value-type="string">
            <text:p text:style-name="P16"><text:span text:style-name="T11">En curso</text:span></text:p>
          </table:table-cell>
        </table:table-row>
      </table:table>
      <text:p text:style-name="P15"/>
      <text:h text:style-name="P2" text:outline-level="1"><text:span text:style-name="T7">8. Conclusiones</text:span></text:h>
      <text:p text:style-name="P14"><text:span text:style-name="T10">El proyecto ha permitido implementar el ciclo completo de un proyecto de Machine Learning sobre datos clínicos reales. Las conclusiones principales son:</text:span></text:p>
      <text:list text:continue-numbering="true" text:style-name="WWNum2">
        <text:list-item>
          <text:p text:style-name="P5"><text:span text:style-name="T10">El nivel de glucosa es el predictor más relevante para el diagnóstico de diabetes, confirmado tanto por el análisis de correlación como por la importancia de características del árbol de decisión.</text:span></text:p>
        </text:list-item>
        <text:list-item>
          <text:p text:style-name="P5"><text:span text:style-name="T10">El modelo KNN con k=7 alcanza un accuracy del ~85%, superando al árbol de decisión (~81%), aunque ambos resultados son satisfactorios para un modelo de clasificación binaria sobre datos biomédicos.</text:span></text:p>
        </text:list-item>
        <text:list-item>
          <text:p text:style-name="P5"><text:span text:style-name="T10">El preprocesamiento es crítico: la imputación correcta de los 361 valores codificados como cero mejora significativamente el rendimiento de los modelos.</text:span></text:p>
        </text:list-item>
        <text:list-item>
          <text:p text:style-name="P5"><text:span text:style-name="T10">La validación cruzada de 5 pliegues confirma que los resultados son estables y no debidos al azar de una única partición de datos.</text:span></text:p>
        </text:list-item>
      </text:list>
      <text:p text:style-name="P15"/>
      <text:p text:style-name="P14"><text:span text:style-name="T10">Como líneas de mejora futuras se propone: explorar modelos de ensamblaje (Random Forest, XGBoost), aplicar técnicas de balanceo de clases (SMOTE), y optimizar hiperparámetros mediante GridSearchCV.</text:span></text:p>
      <text:p text:style-name="P15"/>
      <text:h text:style-name="P2" text:outline-level="1"><text:span text:style-name="T7">Referencias</text:span></text:h>
      <text:p text:style-name="P14"><text:span text:style-name="T10">Smith, J.W. et al. (1988). Using the ADAP Learning Algorithm to Forecast the Onset of Diabetes Mellitus. Proceedings of the Annual Symposium on Computer Application in Medical Care.</text:span></text:p>
      <text:p text:style-name="P14"><text:span text:style-name="T10">Pedregosa, F. et al. (2011). Scikit-learn: Machine Learning in Python. JMLR, 12, pp.2825-2830. https://scikit-learn.org</text:span></text:p>
      <text:p text:style-name="P14"><text:span text:style-name="T10">McKinney, W. (2010). Data Structures for Statistical Computing in Python. Proceedings of SciPy 2010. https://pandas.pydata.org</text:span></text:p>
      <text:p text:style-name="P14"><text:span text:style-name="T10">Kaggle. Pima Indians Diabetes Database. https://www.kaggle.com/datasets/uciml/pima-indians-diabetes-databa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1565c0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12cm" style:contextual-spacing="false"/>
      <style:text-properties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53cm" fo:margin-bottom="0.176cm" style:contextual-spacing="false"/>
      <style:text-properties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1565c0"/>
    </style:style>
    <style:style style:name="MT1" style:family="text">
      <style:text-properties fo:color="#546e7a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lasificador de Estado de Salud | Proyecto 3 — CE Pytho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5-06T08:03:40.491000000</meta:creation-date>
    <dc:date>2026-05-06T08:03:40.510000000</dc:date>
    <meta:document-statistic meta:table-count="6" meta:image-count="0" meta:object-count="0" meta:page-count="9" meta:paragraph-count="203" meta:word-count="1545" meta:character-count="10684" meta:non-whitespace-character-count="9333"/>
    <meta:generator>LibreOffice/7.5.6.2$Linux_X86_64 LibreOffice_project/50$Build-2</meta:generator>
  </office:meta>
</office:document-meta>
</file>